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F00000493524F3500.jpg" manifest:media-type="image/jpeg"/>
  <manifest:file-entry manifest:full-path="Pictures/100000000000063F00000456C1457D8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.0366in" svg:y="0.0193in" svg:width="5.5091in" svg:height="3.8244in" draw:z-index="1"><draw:image xlink:href="Pictures/100000000000063F00000456C1457D86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0681in" svg:y="0.1598in" svg:width="5.478in" svg:height="4.011in" draw:z-index="0"><draw:image xlink:href="Pictures/100000000000063F00000493524F350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2T12:29:33.718945999</meta:creation-date>
    <dc:date>2026-07-02T12:33:12.238429642</dc:date>
    <meta:editing-duration>PT3M3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